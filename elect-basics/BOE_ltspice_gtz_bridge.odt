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E0000037E4C5717E0.png" manifest:media-type="image/png"/>
  <manifest:file-entry manifest:full-path="Pictures/100000000000077E00000396EE0276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text-properties fo:font-size="10pt" style:font-size-asian="10pt" style:font-size-complex="10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2" text:anchor-type="char" svg:x="-0.0492in" svg:y="4.2217in" svg:width="6.9252in" draw:z-index="2"><draw:text-box fo:min-height="3.3138in"><text:p text:style-name="Figure"><draw:frame draw:style-name="fr2" draw:name="Image2" text:anchor-type="paragraph" svg:width="6.9252in" style:rel-width="100%" svg:height="3.3138in" style:rel-height="scale" draw:z-index="3"><draw:image xlink:href="Pictures/100000000000077E00000396EE0276DC.png" xlink:type="simple" xlink:show="embed" xlink:actuate="onLoad" draw:mime-type="image/png"/></draw:frame><text:span text:style-name="T1">Figure </text:span><text:span text:style-name="T1"><text:sequence text:ref-name="refFigure1" text:name="Figure" text:formula="ooow:Figure+1" style:num-format="1">2</text:sequence></text:span><text:span text:style-name="T1">: </text:span><text:span text:style-name="Strong_20_Emphasis"><text:span text:style-name="T1">Alternating conduction of diode pairs in the Graetz bridge. In opposite half-cycles, different diode pairs conduct, but current through R1 remains in the same direction, producing full-wave rectification.</text:span></text:span></text:p></draw:text-box></draw:frame><draw:frame draw:style-name="fr3" draw:name="Frame1" text:anchor-type="char" svg:width="7.7126in" draw:z-index="0"><draw:text-box fo:min-height="3.6547in"><text:p text:style-name="P1"><draw:frame draw:style-name="fr2" draw:name="Image1" text:anchor-type="paragraph" svg:width="6.9252in" style:rel-width="100%" svg:height="3.2811in" style:rel-height="scale" draw:z-index="1"><draw:image xlink:href="Pictures/100000000000075E0000037E4C5717E0.png" xlink:type="simple" xlink:show="embed" xlink:actuate="onLoad" draw:mime-type="image/png"/></draw:frame>Figure <text:sequence text:ref-name="refFigure0" text:name="Figure" text:formula="ooow:Figure+1" style:num-format="1">1</text:sequence>: Graetz bridge rectifier in LTSpice. When the upper AC terminal of V1 is positive, diodes D3 and D1 conduct; when the lower AC terminal is positive, diodes D4 and D2 conduct. Current through R1 always flows in the same direction, so the sinusoidal AC input is converted into a positive pulsating output (full-wave rectification).</text:p></draw:text-box></draw:frame><text:span text:style-name="T2"><text:line-break/><text:line-break/>When the </text:span><text:span text:style-name="Strong_20_Emphasis"><text:span text:style-name="T2">upper AC terminal</text:span></text:span><text:span text:style-name="T2"> of source V1 is positive, current flows through diode </text:span><text:span text:style-name="Strong_20_Emphasis"><text:span text:style-name="T2">D3</text:span></text:span><text:span text:style-name="T2">, then through resistor </text:span><text:span text:style-name="Strong_20_Emphasis"><text:span text:style-name="T2">R1</text:span></text:span><text:span text:style-name="T2">, and returns through diode </text:span><text:span text:style-name="Strong_20_Emphasis"><text:span text:style-name="T2">D1</text:span></text:span><text:span text:style-name="T2">.<text:line-break/>When the </text:span><text:span text:style-name="Strong_20_Emphasis"><text:span text:style-name="T2">lower AC terminal</text:span></text:span><text:span text:style-name="T2"> of source V1 is positive, current flows through diode </text:span><text:span text:style-name="Strong_20_Emphasis"><text:span text:style-name="T2">D4</text:span></text:span><text:span text:style-name="T2">, then through resistor </text:span><text:span text:style-name="Strong_20_Emphasis"><text:span text:style-name="T2">R1</text:span></text:span><text:span text:style-name="T2">, and returns through diode </text:span><text:span text:style-name="Strong_20_Emphasis"><text:span text:style-name="T2">D2</text:span></text:span><text:span text:style-name="T2">.<text:line-break/>In both cases, current flows through </text:span><text:span text:style-name="Strong_20_Emphasis"><text:span text:style-name="T2">R1 in the same direction</text:span></text:span><text:span text:style-name="T2">, so the AC input is converted into a </text:span><text:span text:style-name="Strong_20_Emphasis"><text:span text:style-name="T2">full-wave rectified</text:span></text:span><text:span text:style-name="T2"> output.<text:line-break/></text:span><text:soft-page-break/><text:span text:style-name="T2"><text:line-break/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8T18:50:07.485983813</meta:creation-date>
    <dc:date>2026-05-08T19:25:42.809161775</dc:date>
    <meta:editing-duration>PT35M33S</meta:editing-duration>
    <meta:editing-cycles>4</meta:editing-cycles>
    <meta:generator>LibreOffice/26.2.3.2$Linux_X86_64 LibreOffice_project/620$Build-2</meta:generator>
    <meta:document-statistic meta:table-count="0" meta:image-count="2" meta:object-count="0" meta:page-count="2" meta:paragraph-count="3" meta:word-count="156" meta:character-count="964" meta:non-whitespace-character-count="807"/>
  </office:meta>
</office:document-meta>
</file>