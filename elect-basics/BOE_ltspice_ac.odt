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50000036FB6AD4FB8.png" manifest:media-type="image/png"/>
  <manifest:file-entry manifest:full-path="Pictures/1000000000000779000003C8832228D4.png" manifest:media-type="image/png"/>
  <manifest:file-entry manifest:full-path="Pictures/100000000000077D000003DBE9D269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855c"/>
    </style:style>
    <style:style style:name="T1" style:family="text">
      <style:text-properties officeooo:rsid="0005855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char" svg:width="6.9252in" draw:z-index="0"><draw:text-box fo:min-height="3.5654in"><text:p text:style-name="Figure"><draw:frame draw:style-name="fr2" draw:name="Image1" text:anchor-type="paragraph" svg:width="6.9252in" style:rel-width="100%" svg:height="3.5654in" style:rel-height="scale" draw:z-index="1"><draw:image xlink:href="Pictures/100000000000077D000003DBE9D26946.png" xlink:type="simple" xlink:show="embed" xlink:actuate="onLoad" draw:mime-type="image/png"/></draw:frame>Figure <text:sequence text:ref-name="refFigure0" text:name="Figure" text:formula="ooow:Figure+1" style:num-format="1">1</text:sequence>: Figure 1: V(n002) = voltage across capacitor C1 (green, ~630mV peak); I(C1) = current through capacitor (blue, ~10mA peak); both are sine waves, meaning capacitor passes AC freely.</text:p></draw:text-box></draw:frame><text:line-break/><text:line-break/><draw:frame draw:style-name="fr3" draw:name="Frame2" text:anchor-type="char" svg:x="-0.0063in" svg:y="4.3445in" svg:width="6.9252in" draw:z-index="2"><draw:text-box fo:min-height="3.5035in"><text:p text:style-name="Figure"><draw:frame draw:style-name="fr2" draw:name="Image2" text:anchor-type="paragraph" svg:width="6.9252in" style:rel-width="100%" svg:height="3.5035in" style:rel-height="scale" draw:z-index="3"><draw:image xlink:href="Pictures/1000000000000779000003C8832228D4.png" xlink:type="simple" xlink:show="embed" xlink:actuate="onLoad" draw:mime-type="image/png"/></draw:frame>Figure <text:sequence text:ref-name="refFigure1" text:name="Figure" text:formula="ooow:Figure+1" style:num-format="1">2</text:sequence>: Figure 4: V(n002) = voltage across inductor L1 (blue, ~360mV peak); I(L1) = current through inductor (green, ~10mA peak); both are sine waves, meaning inductor passes AC. Current slightly lags voltage, <text:span text:style-name="T1">c</text:span>haracteristic inductor behavior.</text:p></draw:text-box></draw:frame><text:line-break/><text:line-break/><text:soft-page-break/><text:line-break/><draw:frame draw:style-name="fr1" draw:name="Frame3" text:anchor-type="char" svg:width="6.9252in" draw:z-index="4"><draw:text-box fo:min-height="3.1882in"><text:p text:style-name="Figure"><draw:frame draw:style-name="fr2" draw:name="Image3" text:anchor-type="paragraph" svg:width="6.9252in" style:rel-width="100%" svg:height="3.1882in" style:rel-height="scale" draw:z-index="5"><draw:image xlink:href="Pictures/10000000000007750000036FB6AD4FB8.png" xlink:type="simple" xlink:show="embed" xlink:actuate="onLoad" draw:mime-type="image/png"/></draw:frame>Figure <text:sequence text:ref-name="refFigure2" text:name="Figure" text:formula="ooow:Figure+1" style:num-format="1">3</text:sequence>: Figure 5: V(n002) = voltage across diode D1 (blue); I(D1) = current through diode (green, ~9mA peaks); current flows only during positive half-cycles. <text:span text:style-name="T1">D</text:span>iode rectifies AC, blocking the negative half completely.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8T18:14:07.785875436</meta:creation-date>
    <dc:date>2026-05-08T18:28:09.389494319</dc:date>
    <meta:editing-duration>PT14M1S</meta:editing-duration>
    <meta:editing-cycles>1</meta:editing-cycles>
    <meta:document-statistic meta:table-count="0" meta:image-count="3" meta:object-count="0" meta:page-count="2" meta:paragraph-count="4" meta:word-count="99" meta:character-count="659" meta:non-whitespace-character-count="558"/>
    <meta:generator>LibreOffice/26.2.3.2$Linux_X86_64 LibreOffice_project/620$Build-2</meta:generator>
  </office:meta>
</office:document-meta>
</file>