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9000003C7772B2F7F.png" manifest:media-type="image/png"/>
  <manifest:file-entry manifest:full-path="Pictures/100000000000077C000003CF264FBE71.png" manifest:media-type="image/png"/>
  <manifest:file-entry manifest:full-path="Pictures/10000000000007760000039C5D6D5E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8cd6"/>
    </style:style>
    <style:style style:name="P2" style:family="paragraph" style:parent-style-name="Figure">
      <style:text-properties officeooo:paragraph-rsid="001938ff"/>
    </style:style>
    <style:style style:name="T1" style:family="text">
      <style:text-properties officeooo:rsid="0019fdf7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char" svg:width="6.9252in" draw:z-index="0"><draw:text-box fo:min-height="3.35in"><text:p text:style-name="Figure"><draw:frame draw:style-name="fr2" draw:name="Image1" text:anchor-type="paragraph" svg:width="6.9252in" style:rel-width="100%" svg:height="3.35in" style:rel-height="scale" draw:z-index="1"><draw:image xlink:href="Pictures/10000000000007760000039C5D6D5EA4.png" xlink:type="simple" xlink:show="embed" xlink:actuate="onLoad" draw:mime-type="image/png"/></draw:frame>Figure <text:sequence text:ref-name="refFigure0" text:name="Figure" text:formula="ooow:Figure+1" style:num-format="1">1</text:sequence>: Voltage across capacitor = ~10V, Current through capacitor = 0A; meanong that capacitor blocks DC</text:p></draw:text-box></draw:frame><text:line-break/></text:p>
      <text:p text:style-name="P1"><draw:frame draw:style-name="fr3" draw:name="Frame2" text:anchor-type="char" svg:width="6.9252in" draw:z-index="2"><draw:text-box fo:min-height="3.5236in"><text:p text:style-name="P2"><draw:frame draw:style-name="fr2" draw:name="Image2" text:anchor-type="paragraph" svg:width="6.9252in" style:rel-width="100%" svg:height="3.5236in" style:rel-height="scale" draw:z-index="3"><draw:image xlink:href="Pictures/100000000000077C000003CF264FBE71.png" xlink:type="simple" xlink:show="embed" xlink:actuate="onLoad" draw:mime-type="image/png"/></draw:frame>Figure <text:sequence text:ref-name="refFigure1" text:name="Figure" text:formula="ooow:Figure+1" style:num-format="1">2</text:sequence>: Currents I(L1) = 11A, I(R1) = 1A, I(R3) = 10A are all flat across the entire 5s simulation, meaning the inductor passes DC freely and acts as a short circuit.</text:p></draw:text-box></draw:frame><text:line-break/></text:p>
      <text:p text:style-name="P1"/>
      <text:p text:style-name="P1"/>
      <text:p text:style-name="P1"/>
      <text:p text:style-name="P1"/>
      <text:p text:style-name="P1"><draw:frame draw:style-name="fr3" draw:name="Frame3" text:anchor-type="char" svg:width="6.9252in" draw:z-index="4"><draw:text-box fo:min-height="3.5in"><text:p text:style-name="Figure"><draw:frame draw:style-name="fr2" draw:name="Image3" text:anchor-type="paragraph" svg:width="6.9252in" style:rel-width="100%" svg:height="3.5in" style:rel-height="scale" draw:z-index="5"><draw:image xlink:href="Pictures/1000000000000779000003C7772B2F7F.png" xlink:type="simple" xlink:show="embed" xlink:actuate="onLoad" draw:mime-type="image/png"/></draw:frame>Figure <text:span text:style-name="T1">3</text:span>: V(n002) = ~712.8mV (voltage across diode D1 in forward bias); I(D1) = ~9.29mA (current flows through the diode); meaning that diode conducts DC in forward bias direction.</text:p></draw:text-box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8T17:23:11.966168208</meta:creation-date>
    <dc:date>2026-05-08T18:05:38.746386884</dc:date>
    <meta:editing-duration>PT31M26S</meta:editing-duration>
    <meta:editing-cycles>3</meta:editing-cycles>
    <meta:generator>LibreOffice/26.2.3.2$Linux_X86_64 LibreOffice_project/620$Build-2</meta:generator>
    <meta:document-statistic meta:table-count="0" meta:image-count="3" meta:object-count="0" meta:page-count="2" meta:paragraph-count="5" meta:word-count="78" meta:character-count="457" meta:non-whitespace-character-count="380"/>
  </office:meta>
</office:document-meta>
</file>